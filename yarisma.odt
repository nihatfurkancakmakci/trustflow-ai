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052cm" fo:margin-left="-0.051cm" table:align="left"/>
    </style:style>
    <style:style style:name="Table1.A" style:family="table-column">
      <style:table-column-properties style:column-width="1.612cm"/>
    </style:style>
    <style:style style:name="Table1.B" style:family="table-column">
      <style:table-column-properties style:column-width="3.03cm"/>
    </style:style>
    <style:style style:name="Table1.C" style:family="table-column">
      <style:table-column-properties style:column-width="12.409cm"/>
    </style:style>
    <style:style style:name="Table1.A1" style:family="table-cell">
      <style:table-cell-properties style:vertical-align="middle" fo:padding="0cm" fo:border="none"/>
    </style:style>
    <style:style style:name="P1" style:family="paragraph" style:parent-style-name="Standard">
      <style:paragraph-properties fo:margin-left="0cm" fo:margin-right="0cm" fo:margin-top="0cm" fo:margin-bottom="0cm" style:contextual-spacing="false" fo:orphans="2" fo:widows="2" fo:text-indent="0cm" style:auto-text-indent="false"/>
      <style:text-properties officeooo:paragraph-rsid="001211f0"/>
    </style:style>
    <style:style style:name="P2" style:family="paragraph" style:parent-style-name="Standard">
      <style:paragraph-properties fo:margin-left="0cm" fo:margin-right="0cm" fo:margin-top="0cm" fo:margin-bottom="0cm" style:contextual-spacing="false" fo:orphans="2" fo:widows="2" fo:text-indent="0cm" style:auto-text-indent="fals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style:font-name-complex="Inter" style:font-size-complex="12pt" style:font-style-complex="normal" style:font-weight-complex="normal" loext:padding="0.049cm" loext:border="0.06pt solid #000000"/>
    </style:style>
    <style:style style:name="P4"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style:font-name="Inter" fo:font-size="12pt" fo:letter-spacing="normal" fo:font-style="normal" fo:font-weight="normal" loext:padding="0.049cm" loext:border="0.06pt solid #000000"/>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letter-spacing="normal" loext:padding="0.049cm" loext:border="0.06pt solid #000000"/>
    </style:style>
    <style:style style:name="P6" style:family="paragraph" style:parent-style-name="Text_20_body" style:list-style-name="L2">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letter-spacing="normal" loext:padding="0.049cm" loext:border="0.06pt solid #000000"/>
    </style:style>
    <style:style style:name="P7" style:family="paragraph" style:parent-style-name="Text_20_body" style:list-style-name="L3">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letter-spacing="normal" loext:padding="0.049cm" loext:border="0.06pt solid #000000"/>
    </style:style>
    <style:style style:name="P8" style:family="paragraph" style:parent-style-name="Text_20_body" style:list-style-name="L4">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letter-spacing="normal" loext:padding="0.049cm" loext:border="0.06pt solid #000000"/>
    </style:style>
    <style:style style:name="P9" style:family="paragraph" style:parent-style-name="Text_20_body" style:list-style-name="L5">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letter-spacing="normal" loext:padding="0.049cm" loext:border="0.06pt solid #000000"/>
    </style:style>
    <style:style style:name="P10" style:family="paragraph" style:parent-style-name="Text_20_body" style:list-style-name="L6">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letter-spacing="normal" loext:padding="0.049cm" loext:border="0.06pt solid #000000"/>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letter-spacing="normal" style:font-name-complex="Inter" style:font-size-complex="12pt" style:font-style-complex="normal" style:font-weight-complex="normal" loext:padding="0.049cm" loext:border="0.06pt solid #000000"/>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font-name="Inter" fo:font-size="12pt" fo:letter-spacing="normal" fo:font-style="normal" fo:font-weight="normal" loext:padding="0.049cm" loext:border="0.06pt solid #000000"/>
    </style:style>
    <style:style style:name="P13" style:family="paragraph" style:parent-style-name="Text_20_body">
      <style:paragraph-properties fo:margin-left="0cm" fo:margin-right="0cm" fo:margin-top="0cm" fo:margin-bottom="0cm" style:contextual-spacing="false" fo:orphans="2" fo:widows="2" fo:text-indent="0cm" style:auto-text-indent="false"/>
    </style:style>
    <style:style style:name="P14" style:family="paragraph" style:parent-style-name="Standard">
      <style:text-properties officeooo:paragraph-rsid="001211f0"/>
    </style:style>
    <style:style style:name="P15" style:family="paragraph" style:parent-style-name="Text_20_body">
      <style:paragraph-properties fo:margin-left="0cm" fo:margin-right="0cm" fo:margin-top="0cm" fo:margin-bottom="0cm" style:contextual-spacing="false" fo:text-indent="0cm" style:auto-text-indent="false"/>
    </style:style>
    <style:style style:name="P16" style:family="paragraph" style:parent-style-name="Table_20_Heading">
      <style:paragraph-properties fo:margin-left="0cm" fo:margin-right="0cm" fo:margin-top="0cm" fo:margin-bottom="0cm" style:contextual-spacing="false" fo:text-indent="0cm" style:auto-text-indent="false"/>
    </style:style>
    <style:style style:name="P17" style:family="paragraph" style:parent-style-name="Table_20_Contents">
      <style:paragraph-properties fo:margin-left="0cm" fo:margin-right="0cm" fo:margin-top="0cm" fo:margin-bottom="0cm" style:contextual-spacing="false" fo:text-indent="0cm" style:auto-text-indent="false"/>
      <style:text-properties loext:padding="0.049cm" loext:border="0.06pt solid #000000"/>
    </style:style>
    <style:style style:name="P18" style:family="paragraph" style:parent-style-name="Table_20_Contents">
      <style:paragraph-properties fo:margin-left="0cm" fo:margin-right="0cm" fo:margin-top="0cm" fo:margin-bottom="0cm" style:contextual-spacing="false" fo:text-indent="0cm" style:auto-text-indent="false"/>
      <style:text-properties fo:color="#ffffff" loext:opacity="100%" style:font-name="Arial2" fo:font-size="12pt" fo:background-color="transparent" loext:padding="0.049cm" loext:border="0.06pt solid #000000"/>
    </style:style>
    <style:style style:name="P19" style:family="paragraph" style:parent-style-name="Table_20_Contents">
      <style:paragraph-properties fo:margin-left="0cm" fo:margin-right="0cm" fo:margin-top="0cm" fo:margin-bottom="0cm" style:contextual-spacing="false" fo:text-indent="0cm" style:auto-text-indent="false"/>
      <style:text-properties fo:color="#ffffff" loext:opacity="100%" style:font-name="Arial2" fo:font-size="11pt" fo:background-color="transparent" loext:padding="0.049cm" loext:border="0.06pt solid #000000"/>
    </style:style>
    <style:style style:name="P20" style:family="paragraph" style:parent-style-name="Text_20_body">
      <style:paragraph-properties fo:margin-left="0cm" fo:margin-right="0cm" fo:margin-top="0cm" fo:margin-bottom="0cm" style:contextual-spacing="false" fo:text-indent="0cm" style:auto-text-indent="false"/>
      <style:text-properties loext:padding="0.049cm" loext:border="0.06pt solid #000000"/>
    </style:style>
    <style:style style:name="P21" style:family="paragraph" style:parent-style-name="Text_20_body" style:list-style-name="L7">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2" style:family="paragraph" style:parent-style-name="Text_20_body" style:list-style-name="L8">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3" style:family="paragraph" style:parent-style-name="Text_20_body" style:list-style-name="L9">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4" style:family="paragraph" style:parent-style-name="Text_20_body" style:list-style-name="L10">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5" style:family="paragraph" style:parent-style-name="Text_20_body" style:list-style-name="L11">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6" style:family="paragraph" style:parent-style-name="Text_20_body" style:list-style-name="L12">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7" style:family="paragraph" style:parent-style-name="Text_20_body" style:list-style-name="L13">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8" style:family="paragraph" style:parent-style-name="Text_20_body" style:list-style-name="L14">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9" style:family="paragraph" style:parent-style-name="Heading_20_1">
      <style:text-properties officeooo:paragraph-rsid="001211f0" loext:padding="0.049cm" loext:border="0.06pt solid #000000"/>
    </style:style>
    <style:style style:name="P30" style:family="paragraph" style:parent-style-name="Text_20_body" style:list-style-name="L15">
      <style:paragraph-properties fo:margin-left="0cm" fo:margin-right="0cm" fo:margin-top="0cm" fo:margin-bottom="0cm" style:contextual-spacing="false" fo:text-indent="0cm" style:auto-text-indent="false" fo:padding="0.049cm" fo:border="0.06pt solid #000000"/>
    </style:style>
    <style:style style:name="P31" style:family="paragraph" style:parent-style-name="Text_20_body" style:list-style-name="L16">
      <style:paragraph-properties fo:margin-left="0cm" fo:margin-right="0cm" fo:margin-top="0cm" fo:margin-bottom="0cm" style:contextual-spacing="false" fo:text-indent="0cm" style:auto-text-indent="false" fo:padding="0.049cm" fo:border="0.06pt solid #000000"/>
    </style:style>
    <style:style style:name="P32" style:family="paragraph" style:parent-style-name="Text_20_body" style:list-style-name="L17">
      <style:paragraph-properties fo:margin-left="0cm" fo:margin-right="0cm" fo:margin-top="0cm" fo:margin-bottom="0cm" style:contextual-spacing="false" fo:text-indent="0cm" style:auto-text-indent="false" fo:padding="0.049cm" fo:border="0.06pt solid #000000"/>
    </style:style>
    <style:style style:name="P33" style:family="paragraph" style:parent-style-name="Text_20_body" style:list-style-name="L18">
      <style:paragraph-properties fo:margin-left="0cm" fo:margin-right="0cm" fo:margin-top="0cm" fo:margin-bottom="0cm" style:contextual-spacing="false" fo:text-indent="0cm" style:auto-text-indent="false" fo:padding="0.049cm" fo:border="0.06pt solid #000000"/>
    </style:style>
    <style:style style:name="P34" style:family="paragraph" style:parent-style-name="Text_20_body" style:list-style-name="L19">
      <style:paragraph-properties fo:margin-left="0cm" fo:margin-right="0cm" fo:margin-top="0cm" fo:margin-bottom="0cm" style:contextual-spacing="false" fo:text-indent="0cm" style:auto-text-indent="false" fo:padding="0.049cm" fo:border="0.06pt solid #000000"/>
    </style:style>
    <style:style style:name="P35" style:family="paragraph" style:parent-style-name="Text_20_body" style:list-style-name="L20">
      <style:paragraph-properties fo:margin-left="0cm" fo:margin-right="0cm" fo:margin-top="0cm" fo:margin-bottom="0cm" style:contextual-spacing="false" fo:text-indent="0cm" style:auto-text-indent="false" fo:padding="0.049cm" fo:border="0.06pt solid #000000"/>
    </style:style>
    <style:style style:name="P36" style:family="paragraph" style:parent-style-name="Text_20_body" style:list-style-name="L21">
      <style:paragraph-properties fo:margin-left="0cm" fo:margin-right="0cm" fo:margin-top="0cm" fo:margin-bottom="0cm" style:contextual-spacing="false" fo:text-indent="0cm" style:auto-text-indent="false" fo:padding="0.049cm" fo:border="0.06pt solid #000000"/>
    </style:style>
    <style:style style:name="P37" style:family="paragraph" style:parent-style-name="Text_20_body" style:list-style-name="L22">
      <style:paragraph-properties fo:margin-left="0cm" fo:margin-right="0cm" fo:margin-top="0cm" fo:margin-bottom="0cm" style:contextual-spacing="false" fo:text-indent="0cm" style:auto-text-indent="false" fo:padding="0.049cm" fo:border="0.06pt solid #000000"/>
    </style:style>
    <style:style style:name="P38" style:family="paragraph" style:parent-style-name="Standard">
      <style:text-properties officeooo:paragraph-rsid="001211f0" loext:padding="0.049cm" loext:border="0.06pt solid #000000"/>
    </style:style>
    <style:style style:name="P39" style:family="paragraph" style:parent-style-name="Standard">
      <style:paragraph-properties fo:margin-left="0cm" fo:margin-right="0cm" fo:margin-top="0cm" fo:margin-bottom="0cm" style:contextual-spacing="false" fo:text-indent="0cm" style:auto-text-indent="false"/>
    </style:style>
    <style:style style:name="P40" style:family="paragraph" style:parent-style-name="Standard">
      <style:paragraph-properties fo:margin-left="0cm" fo:margin-right="0cm" fo:margin-top="0cm" fo:margin-bottom="0cm" style:contextual-spacing="false" fo:text-indent="0cm" style:auto-text-indent="false"/>
      <style:text-properties loext:padding="0.049cm" loext:border="0.06pt solid #000000"/>
    </style:style>
    <style:style style:name="P41" style:family="paragraph" style:parent-style-name="Horizontal_20_Line">
      <style:paragraph-properties fo:margin-left="0cm" fo:margin-right="0cm" fo:margin-top="0cm" fo:margin-bottom="0cm" style:contextual-spacing="false"/>
      <style:text-properties loext:padding="0.049cm" loext:border="0.06pt solid #000000"/>
    </style:style>
    <style:style style:name="P42" style:family="paragraph" style:parent-style-name="Text_20_body" style:list-style-name="L23">
      <style:paragraph-properties fo:margin-left="0cm" fo:margin-right="0cm" fo:margin-top="0cm" fo:margin-bottom="0cm" style:contextual-spacing="false" fo:text-indent="0cm" style:auto-text-indent="false" fo:padding="0.049cm" fo:border="0.06pt solid #000000"/>
    </style:style>
    <style:style style:name="P43" style:family="paragraph" style:parent-style-name="Text_20_body" style:list-style-name="L24">
      <style:paragraph-properties fo:margin-left="0cm" fo:margin-right="0cm" fo:margin-top="0cm" fo:margin-bottom="0cm" style:contextual-spacing="false" fo:text-indent="0cm" style:auto-text-indent="false" fo:padding="0.049cm" fo:border="0.06pt solid #000000"/>
    </style:style>
    <style:style style:name="P44" style:family="paragraph" style:parent-style-name="Text_20_body">
      <style:paragraph-properties fo:margin-left="0cm" fo:margin-right="0cm" fo:margin-top="0cm" fo:margin-bottom="0cm" style:contextual-spacing="false" fo:text-indent="0cm" style:auto-text-indent="false"/>
      <style:text-properties fo:font-size="12pt" loext:padding="0.049cm" loext:border="0.06pt solid #000000"/>
    </style:style>
    <style:style style:name="P45" style:family="paragraph" style:parent-style-name="Heading_20_2">
      <style:paragraph-properties fo:margin-left="0cm" fo:margin-right="0cm" fo:margin-top="0cm" fo:margin-bottom="0cm" style:contextual-spacing="false" fo:line-height="133%" fo:text-indent="0cm" style:auto-text-indent="false" fo:padding="0.049cm" fo:border="0.06pt solid #000000"/>
      <style:text-properties loext:padding="0.049cm" loext:border="0.06pt solid #000000"/>
    </style:style>
    <style:style style:name="P46" style:family="paragraph" style:parent-style-name="Text_20_body">
      <style:paragraph-properties fo:margin-left="0cm" fo:margin-right="0cm" fo:margin-top="0cm" fo:margin-bottom="0cm" style:contextual-spacing="false" fo:text-indent="0cm" style:auto-text-indent="false"/>
      <style:text-properties style:font-name="Inter" fo:font-size="12pt" fo:background-color="transparent" loext:padding="0.049cm" loext:border="0.06pt solid #000000"/>
    </style:style>
    <style:style style:name="P47" style:family="paragraph" style:parent-style-name="Text_20_body" style:list-style-name="L25">
      <style:paragraph-properties fo:margin-left="0cm" fo:margin-right="0cm" fo:margin-top="0cm" fo:margin-bottom="0cm" style:contextual-spacing="false" fo:text-indent="0cm" style:auto-text-indent="false" fo:padding="0.049cm" fo:border="0.06pt solid #000000"/>
    </style:style>
    <style:style style:name="P48" style:family="paragraph" style:parent-style-name="Text_20_body" style:list-style-name="L26">
      <style:paragraph-properties fo:margin-left="0cm" fo:margin-right="0cm" fo:margin-top="0cm" fo:margin-bottom="0cm" style:contextual-spacing="false" fo:text-indent="0cm" style:auto-text-indent="false" fo:padding="0.049cm" fo:border="0.06pt solid #000000"/>
    </style:style>
    <style:style style:name="P49" style:family="paragraph" style:parent-style-name="Text_20_body" style:list-style-name="L27">
      <style:paragraph-properties fo:margin-left="0cm" fo:margin-right="0cm" fo:margin-top="0cm" fo:margin-bottom="0cm" style:contextual-spacing="false" fo:text-indent="0cm" style:auto-text-indent="false" fo:padding="0.049cm" fo:border="0.06pt solid #000000"/>
    </style:style>
    <style:style style:name="P50" style:family="paragraph" style:parent-style-name="Text_20_body" style:list-style-name="L28">
      <style:paragraph-properties fo:margin-left="0cm" fo:margin-right="0cm" fo:margin-top="0cm" fo:margin-bottom="0cm" style:contextual-spacing="false" fo:text-indent="0cm" style:auto-text-indent="false" fo:padding="0.049cm" fo:border="0.06pt solid #000000"/>
    </style:style>
    <style:style style:name="P51" style:family="paragraph" style:parent-style-name="Text_20_body" style:list-style-name="L29">
      <style:paragraph-properties fo:margin-left="0cm" fo:margin-right="0cm" fo:margin-top="0cm" fo:margin-bottom="0cm" style:contextual-spacing="false" fo:text-indent="0cm" style:auto-text-indent="false" fo:padding="0.049cm" fo:border="0.06pt solid #000000"/>
    </style:style>
    <style:style style:name="P52" style:family="paragraph" style:parent-style-name="Text_20_body" style:list-style-name="L30">
      <style:paragraph-properties fo:margin-left="0cm" fo:margin-right="0cm" fo:margin-top="0cm" fo:margin-bottom="0cm" style:contextual-spacing="false" fo:text-indent="0cm" style:auto-text-indent="false" fo:padding="0.049cm" fo:border="0.06pt solid #000000"/>
    </style:style>
    <style:style style:name="P53" style:family="paragraph" style:parent-style-name="Text_20_body" style:list-style-name="L31">
      <style:paragraph-properties fo:margin-left="0cm" fo:margin-right="0cm" fo:margin-top="0cm" fo:margin-bottom="0cm" style:contextual-spacing="false" fo:text-indent="0cm" style:auto-text-indent="false" fo:padding="0.049cm" fo:border="0.06pt solid #000000"/>
    </style:style>
    <style:style style:name="T1" style:family="text">
      <style:text-properties fo:font-variant="normal" fo:text-transform="none" style:font-name="Inter" fo:font-size="12pt" fo:letter-spacing="normal" fo:font-style="normal" fo:font-weight="normal" officeooo:rsid="001211f0" loext:padding="0.049cm" loext:border="0.06pt solid #000000"/>
    </style:style>
    <style:style style:name="T2" style:family="text">
      <style:text-properties fo:font-variant="normal" fo:text-transform="none" style:font-name="Inter" fo:font-size="12pt" fo:letter-spacing="normal" fo:font-style="normal" fo:font-weight="normal" loext:padding="0.049cm" loext:border="0.06pt solid #000000"/>
    </style:style>
    <style:style style:name="T3" style:family="text">
      <style:text-properties fo:font-variant="normal" fo:text-transform="none" style:font-name="Inter" fo:font-size="12pt" fo:letter-spacing="normal" fo:font-style="normal" fo:font-weight="bold" officeooo:rsid="001211f0" style:font-weight-asian="bold" style:font-weight-complex="bold" loext:padding="0.049cm" loext:border="0.06pt solid #000000"/>
    </style:style>
    <style:style style:name="T4" style:family="text">
      <style:text-properties fo:font-variant="normal" fo:text-transform="none" style:font-name="Inter" fo:font-size="12pt" fo:letter-spacing="normal" fo:font-style="normal" fo:font-weight="bold" loext:padding="0.049cm" loext:border="0.06pt solid #000000"/>
    </style:style>
    <style:style style:name="T5" style:family="text">
      <style:text-properties style:font-name="Inter" fo:font-size="12pt" fo:font-style="normal" fo:font-weight="normal"/>
    </style:style>
    <style:style style:name="T6" style:family="text">
      <style:text-properties loext:padding="0.049cm" loext:border="0.06pt solid #000000"/>
    </style:style>
    <style:style style:name="T7" style:family="text">
      <style:text-properties fo:font-size="18pt" fo:font-weight="bold" loext:padding="0.049cm" loext:border="0.06pt solid #000000"/>
    </style:style>
    <style:style style:name="T8" style:family="text">
      <style:text-properties fo:font-weight="bold" loext:padding="0.049cm" loext:border="0.06pt solid #000000"/>
    </style:style>
    <style:style style:name="T9" style:family="text">
      <style:text-properties fo:color="#ffffff" loext:opacity="100%" style:font-name="Arial2" fo:font-size="11pt" fo:background-color="transparent" loext:char-shading-value="0"/>
    </style:style>
    <style:style style:name="T10" style:family="text">
      <style:text-properties style:font-name="Inter" fo:font-size="12pt" fo:font-weight="bold" fo:background-color="transparent" loext:char-shading-value="0" loext:padding="0.049cm" loext:border="0.06pt solid #000000"/>
    </style:style>
    <style:style style:name="T11" style:family="text">
      <style:text-properties fo:font-size="18pt" fo:font-weight="bold"/>
    </style:style>
    <style:style style:name="T12" style:family="text">
      <style:text-properties style:font-name="Inter" fo:font-size="12pt" fo:background-color="transparent" loext:char-shading-value="0"/>
    </style:style>
    <style:style style:name="T13" style:family="text">
      <style:text-properties fo:background-color="transparent" loext:char-shading-value="0" loext:padding="0.049cm" loext:border="0.06pt solid #000000"/>
    </style:style>
    <style:style style:name="T14" style:family="text">
      <style:text-properties style:font-name="Inter" fo:font-size="12pt" fo:background-color="transparent" loext:char-shading-value="0" loext:padding="0.049cm" loext:border="0.06pt solid #000000"/>
    </style:style>
    <style:style style:name="T15" style:family="text">
      <style:text-properties fo:font-size="12pt" fo:font-weight="bold" loext:padding="0.049cm" loext:border="0.06pt solid #000000"/>
    </style:style>
    <style:style style:name="T16" style:family="text">
      <style:text-properties fo:font-family="Outfit, sans-serif" fo:font-size="12pt" fo:font-weight="bold"/>
    </style:style>
    <style:style style:name="T17" style:family="text">
      <style:text-properties style:font-name="Inter" fo:font-size="12pt" loext:padding="0.049cm" loext:border="0.06pt solid #000000"/>
    </style:style>
    <style:style style:name="T18" style:family="text">
      <style:text-properties style:font-name="Inter" fo:font-size="12pt" fo:font-weight="bold" loext:padding="0.049cm" loext:border="0.06pt solid #0000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tellar to journey to mastery 2.0 Programı </text:span><text:span text:style-name="T2"><text:line-break/><text:line-break/></text:span><text:span text:style-name="T3">Program Hakkında</text:span></text:p>
      <text:p text:style-name="P1"><text:span text:style-name="T2"><text:line-break/>Hoşgeldiniz to </text:span><text:span text:style-name="Strong_20_Emphasis"><text:span text:style-name="T4">Ustalığa Yıldız Yolculuğu</text:span></text:span><text:span text:style-name="T2"> İnşaatçıların eğitimleri izlemeyi bırakıp gerçek ürünleri göndermeye başladığı —.</text:span></text:p>
      <text:p text:style-name="P2"><text:span text:style-name="T2">Bu başka bir kurs, eğitim kampı veya hafta sonu hackathon'u değil. Bu, aranızdan çıkmanıza yardımcı olmak için tasarlanmış uygulamalı bir inşaatçı yolculuğudur </text:span><text:span text:style-name="Strong_20_Emphasis"><text:span text:style-name="T4">i̇lk cüzdan bağlantısı</text:span></text:span><text:span text:style-name="T2"> başlatmaya a </text:span><text:span text:style-name="Strong_20_Emphasis"><text:span text:style-name="T4">stellar'da gerçek dünya uygulaması</text:span></text:span><text:span text:style-name="T2">.</text:span></text:p>
      <text:p text:style-name="P3">﻿</text:p>
      <text:p text:style-name="P4">Birden fazla seviyede şunları yapacaksınız:</text:p>
      <text:list text:style-name="L1">
        <text:list-item>
          <text:p text:style-name="P5">⚡ <text:span text:style-name="T5">Gerçek dApps ve akıllı sözleşmeler oluşturun</text:span></text:p>
        </text:list-item>
      </text:list>
      <text:list text:style-name="L2">
        <text:list-item>
          <text:p text:style-name="P6">⁇ ️ <text:span text:style-name="T5">Gemi üretimine hazır projeler</text:span></text:p>
        </text:list-item>
      </text:list>
      <text:list text:style-name="L3">
        <text:list-item>
          <text:p text:style-name="P7">👥 <text:span text:style-name="T5">Yerleşik gerçek kullanıcılar</text:span></text:p>
        </text:list-item>
      </text:list>
      <text:list text:style-name="L4">
        <text:list-item>
          <text:p text:style-name="P8">🌍 <text:span text:style-name="T5">Mainnet'te lansman</text:span></text:p>
        </text:list-item>
      </text:list>
      <text:list text:style-name="L5">
        <text:list-item>
          <text:p text:style-name="P9">💰 <text:span text:style-name="T5">Aylık 20.000$'lık ödül havuzu için yarışın</text:span></text:p>
        </text:list-item>
      </text:list>
      <text:list text:style-name="L6">
        <text:list-item>
          <text:p text:style-name="P10">🚀 <text:span text:style-name="T5">Başlangıç fırsatlarının ve ekosistem finansmanının kilidini açın</text:span></text:p>
        </text:list-item>
      </text:list>
      <text:p text:style-name="P11">﻿</text:p>
      <text:p text:style-name="P12">Ne kadar çok inşa ederseniz, — kuşak sistemi boyunca Beyaz Kuşak'tan Kara Kuşak'a ve ötesine kadar o kadar ilerlersiniz.</text:p>
      <text:p text:style-name="P12">İster öğrenci, ister bilgisayar korsanı, indie oluşturucu veya hevesli bir kurucu olun, bu program yaparak öğrenme, halka açık bir şekilde oluşturma ve gerçekten önemli olan bir şey yaratma şansınızdır.</text:p>
      <text:p text:style-name="P13"><text:span text:style-name="Strong_20_Emphasis"><text:span text:style-name="T4">Kabarıklık yok. Sonsuz öğreticiler yok. Sadece inşa etmek.</text:span></text:span><text:span text:style-name="T2"> 🔥</text:span></text:p>
      <text:p text:style-name="P14"><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span text:style-name="T6">🥋 </text:span><text:span text:style-name="T7">Program Yapısı ve Parçaları</text:span></text:p>
      <text:section text:style-name="Sect1" text:name="Section1">
        <text:p text:style-name="P15"><text:bookmark text:name="rich-text-wrapper"/><text:span text:style-name="Strong_20_Emphasis"><text:span text:style-name="T8">1️ ⁇ Kemer Sistemi &amp; Genel Bakış</text:span></text:span></text:p>
        <text:p text:style-name="P15"><text:span text:style-name="T6">Ustalığa Yıldız Yolculuğu: Aylık İnşaatçı Zorlukları</text:span><text:span text:style-name="Strong_20_Emphasis"><text:span text:style-name="T6"> </text:span></text:span><text:span text:style-name="Strong_20_Emphasis"><text:span text:style-name="T8">seviye tabanlı program</text:span></text:span><text:span text:style-name="T6"> geliştiricilerin Stellar'da gerçek uygulamalar oluşturarak aşamalı kuşak seviyelerinde ilerlediği yer.</text:span></text:p>
        <table:table table:name="Table1" table:style-name="Table1">
          <table:table-column table:style-name="Table1.A"/>
          <table:table-column table:style-name="Table1.B"/>
          <table:table-column table:style-name="Table1.C"/>
          <table:table-row>
            <table:table-cell table:style-name="Table1.A1" office:value-type="string">
              <text:p text:style-name="P16"><text:span text:style-name="Strong_20_Emphasis"><text:span text:style-name="T8">Seviye </text:span></text:span></text:p>
            </table:table-cell>
            <table:table-cell table:style-name="Table1.A1" office:value-type="string">
              <text:p text:style-name="P16"><text:span text:style-name="Strong_20_Emphasis"><text:span text:style-name="T8">Seviye Adı</text:span></text:span></text:p>
            </table:table-cell>
            <table:table-cell table:style-name="Table1.A1" office:value-type="string">
              <text:p text:style-name="P16"><text:span text:style-name="Strong_20_Emphasis"><text:span text:style-name="T8">Odak Konular</text:span></text:span></text:p>
            </table:table-cell>
          </table:table-row>
          <table:table-row>
            <table:table-cell table:style-name="Table1.A1" office:value-type="string">
              <text:p text:style-name="P17">Seviye 1</text:p>
            </table:table-cell>
            <table:table-cell table:style-name="Table1.A1" office:value-type="string">
              <text:p text:style-name="P17">⁇ ️ Beyaz Kuşak</text:p>
            </table:table-cell>
            <table:table-cell table:style-name="Table1.A1" office:value-type="string">
              <text:p text:style-name="P18">Cüzdanlar, Sözleşmeler, İşlemler, Çoklu Cüzdan</text:p>
            </table:table-cell>
          </table:table-row>
          <table:table-row>
            <table:table-cell table:style-name="Table1.A1" office:value-type="string">
              <text:p text:style-name="P17">Seviye 2</text:p>
            </table:table-cell>
            <table:table-cell table:style-name="Table1.A1" office:value-type="string">
              <text:p text:style-name="P17">🟡 Sarı Kuşak</text:p>
            </table:table-cell>
            <table:table-cell table:style-name="Table1.A1" office:value-type="string">
              <text:p text:style-name="P17">Çoklu cüzdan, sözleşmeler ve etkinlikler ve sözleşme yazma</text:p>
            </table:table-cell>
          </table:table-row>
          <table:table-row>
            <table:table-cell table:style-name="Table1.A1" office:value-type="string">
              <text:p text:style-name="P17">Seviye 3</text:p>
            </table:table-cell>
            <table:table-cell table:style-name="Table1.A1" office:value-type="string">
              <text:p text:style-name="P17">🟠 Turuncu Kuşak</text:p>
            </table:table-cell>
            <table:table-cell table:style-name="Table1.A1" office:value-type="string">
              <text:p text:style-name="P17">Mini dApp + testleri + Üretim temel + Avans sözleşmesini tamamlayın</text:p>
            </table:table-cell>
          </table:table-row>
          <table:table-row>
            <table:table-cell table:style-name="Table1.A1" office:value-type="string">
              <text:p text:style-name="P17">﻿</text:p>
            </table:table-cell>
            <table:table-cell table:style-name="Table1.A1" office:value-type="string">
              <text:p text:style-name="P17">Fikir Gönderimi </text:p>
            </table:table-cell>
            <table:table-cell table:style-name="Table1.A1" office:value-type="string">
              <text:p text:style-name="P17">Stellar Anchors'ta yankı uyandıran bazı benzersiz fikirler gönderin</text:p>
            </table:table-cell>
          </table:table-row>
          <table:table-row>
            <table:table-cell table:style-name="Table1.A1" office:value-type="string">
              <text:p text:style-name="P17">Seviye 4</text:p>
            </table:table-cell>
            <table:table-cell table:style-name="Table1.A1" office:value-type="string">
              <text:p text:style-name="P17">🟢 Yeşil Kuşak</text:p>
            </table:table-cell>
            <table:table-cell table:style-name="Table1.A1" office:value-type="string">
              <text:p text:style-name="P17">Üretim Oluştur MVP + 10 kullanıcı (test ağı)</text:p>
            </table:table-cell>
          </table:table-row>
          <table:table-row>
            <table:table-cell table:style-name="Table1.A1" office:value-type="string">
              <text:p text:style-name="P17">Seviye 5</text:p>
            </table:table-cell>
            <table:table-cell table:style-name="Table1.A1" office:value-type="string">
              <text:p text:style-name="P17">🔵 Mavi Kuşak</text:p>
            </table:table-cell>
            <table:table-cell table:style-name="Table1.A1" office:value-type="string">
              <text:p text:style-name="P19">50 Kullanıcıya Ölçeklendirin + Kullanıcı geri bildirimlerine göre birkaç özellik daha ekleyin + Pitch + Demo</text:p>
            </table:table-cell>
          </table:table-row>
          <table:table-row>
            <table:table-cell table:style-name="Table1.A1" office:value-type="string">
              <text:p text:style-name="P17">Seviye 6</text:p>
            </table:table-cell>
            <table:table-cell table:style-name="Table1.A1" office:value-type="string">
              <text:p text:style-name="P17">⁇ ️ Kara Kuşak</text:p>
            </table:table-cell>
            <table:table-cell table:style-name="Table1.A1" office:value-type="string">
              <text:p text:style-name="P17"><text:span text:style-name="T9">Mainnet Lansmanı + Denetim + Gerçek Benimseme + 10 + Mainnet kullanıcısı </text:span>&amp; Demo Günü hazır olun</text:p>
            </table:table-cell>
          </table:table-row>
          <table:table-row>
            <table:table-cell table:style-name="Table1.A1" office:value-type="string">
              <text:p text:style-name="P17">Seviye 7</text:p>
            </table:table-cell>
            <table:table-cell table:style-name="Table1.A1" office:value-type="string">
              <text:p text:style-name="P17">🏆 Ana Kemer</text:p>
            </table:table-cell>
            <table:table-cell table:style-name="Table1.A1" office:value-type="string">
              <text:p text:style-name="P17">SCF hibeleri ve Instaward (seçici projeler) ile başlangıç yolu</text:p>
            </table:table-cell>
          </table:table-row>
        </table:table>
        <text:p text:style-name="P15"><text:span text:style-name="T6"/></text:p>
        <text:p text:style-name="P15"><text:span text:style-name="Strong_20_Emphasis"><text:span text:style-name="T10">2️ ⁇ </text:span></text:span><text:span text:style-name="Strong_20_Emphasis"><text:span text:style-name="T8">Başlangıç Parçası — Ekosistem Kuluçka Parçası</text:span></text:span></text:p>
        <text:p text:style-name="P20">Startup Track, Stellar üzerinde ölçeklenebilir ve etkili ürünler oluşturan yüksek potansiyelli kurucular ve ekipler için tasarlanmıştır.</text:p>
        <text:p text:style-name="P20">Builder Track'in aksine, bu yol gerçek dünya sorunlarını çözmeye, başlangıç kuluçkasına, ekosistem büyümesine ve uzun vadeli ürün geliştirmeye odaklanır.</text:p>
        <text:p text:style-name="P20">Bu parça için yalnızca sınırlı sayıda proje seçilecektir.</text:p>
        <text:p text:style-name="P20">Gibi alanlarda inşa edilen projeler:</text:p>
        <text:list text:style-name="L7">
          <text:list-item>
            <text:p text:style-name="P21">Ödemeler </text:p>
          </text:list-item>
        </text:list>
        <text:list text:style-name="L8">
          <text:list-item>
            <text:p text:style-name="P22">Stablecoin'ler </text:p>
          </text:list-item>
        </text:list>
        <text:list text:style-name="L9">
          <text:list-item>
            <text:p text:style-name="P23">RWA'lar </text:p>
          </text:list-item>
        </text:list>
        <text:list text:style-name="L10">
          <text:list-item>
            <text:p text:style-name="P24">Sınır ötesi finans </text:p>
          </text:list-item>
        </text:list>
        <text:list text:style-name="L11">
          <text:list-item>
            <text:p text:style-name="P25">Cüzdan altyapısı </text:p>
          </text:list-item>
        </text:list>
        <text:list text:style-name="L12">
          <text:list-item>
            <text:p text:style-name="P26">Finansal takımlar </text:p>
          </text:list-item>
        </text:list>
        <text:list text:style-name="L13">
          <text:list-item>
            <text:p text:style-name="P27">AI + Blockchain </text:p>
          </text:list-item>
        </text:list>
        <text:list text:style-name="L14">
          <text:list-item>
            <text:p text:style-name="P28">Stellar Anchor entegrasyonları </text:p>
          </text:list-item>
        </text:list>
        <text:p text:style-name="P20">öncelik verilecektir.</text:p>
        <text:p text:style-name="P20">Seçilen ekipler, kilometre taşlarını tanımlamak, ürünlerini geliştirmek ve ekosistem finansman fırsatlarına hazırlanmak için mentorlar ve ekosisteme katkıda bulunanlarla yakın işbirliği içinde çalışacak.</text:p>
      </text:section>
      <text:p text:style-name="P14"><text:line-break/></text:p>
      <text:p text:style-name="P14"/>
      <text:h text:style-name="P29" text:outline-level="1"><text:soft-page-break/><text:span text:style-name="T11">Program Mekaniği: Nasıl Çalışır</text:span></text:h>
      <text:section text:style-name="Sect1" text:name="Section2">
        <text:p text:style-name="P20"><text:bookmark text:name="rich-text-wrapper Copy 1"/><text:span text:style-name="T12">Yüksek kaliteli ve odaklanmış bir ortam sağlamak için program şu temel ilkeleri takip eder:</text:span></text:p>
        <text:list text:style-name="L15">
          <text:list-item>
            <text:p text:style-name="P30"><text:span text:style-name="Strong_20_Emphasis"><text:span text:style-name="T10">Çevrimiçi ve Küresel:</text:span></text:span><text:span text:style-name="T13"> </text:span><text:span text:style-name="T14">Program %100 çevrimiçidir. İnternet bağlantınız ve Stellar tutkunuz olduğu sürece ödüller oluşturabilir, gönderebilir ve kazanabilirsiniz.</text:span></text:p>
          </text:list-item>
        </text:list>
        <text:list text:style-name="L16">
          <text:list-item>
            <text:p text:style-name="P31"><text:span text:style-name="Strong_20_Emphasis"><text:span text:style-name="T10">Sıralı İlerleme:</text:span></text:span><text:span text:style-name="T13"> </text:span><text:span text:style-name="T14">İnşa edebileceğiniz kadar hızlı ilerleyebilirsiniz! Ancak "kemer zinciriniz" kırılmadan kalmalıdır. Daha yüksek bir kemer için ödüllendirilmek için önceki seviyelere ilişkin tüm gereksinimleri başarıyla karşılamış olmanız gerekir.</text:span></text:p>
          </text:list-item>
        </text:list>
        <text:list text:style-name="L17">
          <text:list-item>
            <text:p text:style-name="P32"><text:span text:style-name="Strong_20_Emphasis"><text:span text:style-name="T10">Aylık Değerlendirme ve Ödüller:</text:span></text:span><text:span text:style-name="T13"> </text:span><text:span text:style-name="T14">Her ayın sonunda teknik komitemiz ilerlemenizi gözden geçirir. Ödül havuzuna katılmaya hak kazanacaksınız </text:span><text:span text:style-name="Strong_20_Emphasis"><text:span text:style-name="T10">en yüksek geçerli seviye</text:span></text:span><text:span text:style-name="T13"> </text:span><text:span text:style-name="T14">o ay boyunca ulaştınız. Bir seviye için ödül alındıktan sonra, gelecekteki ödüllere hak kazanmak için bir sonraki kemere geçmelisiniz (Master seviyesi hariç).</text:span></text:p>
          </text:list-item>
        </text:list>
        <text:list text:style-name="L18">
          <text:list-item>
            <text:p text:style-name="P33"><text:span text:style-name="Strong_20_Emphasis"><text:span text:style-name="T10">Sonsuz Ana Kemer:</text:span></text:span><text:span text:style-name="T13"> </text:span><text:span text:style-name="T14">Seviye 7'ye ulaşmak devam eden bir başarıdır. Master Belt, önemli yeni özellikleri göndererek ve daha gerçek kullanıcıları (Mainnet) bünyesine katarak aylık ödüllere hak kazanmaya devam edebilir. Her zaman iyileştirme ve ölçeklendirme için yer vardır.</text:span></text:p>
          </text:list-item>
        </text:list>
        <text:list text:style-name="L19">
          <text:list-item>
            <text:p text:style-name="P34"><text:span text:style-name="Strong_20_Emphasis"><text:span text:style-name="T10">Yeni ve Gelişen Projeler:</text:span></text:span><text:span text:style-name="T13"> </text:span><text:span text:style-name="T14">Yeni bir fikirle veya mevcut bir projeyle katılabilirsiniz. Ancak başvuruların gösterilmesi gerekmektedir </text:span><text:span text:style-name="Strong_20_Emphasis"><text:span text:style-name="T10">önemli evrim</text:span></text:span><text:span text:style-name="T13"> </text:span><text:span text:style-name="T14">ve program döneminde kaydedilen yeni ilerlemelerle belirli kayış gereksinimlerini karşılayın.</text:span></text:p>
          </text:list-item>
        </text:list>
        <text:list text:style-name="L20">
          <text:list-item>
            <text:p text:style-name="P35"><text:span text:style-name="Strong_20_Emphasis"><text:span text:style-name="T10">Ekip İşbirliği:</text:span></text:span><text:span text:style-name="T13"> </text:span><text:span text:style-name="T14">Ekip olarak çalışabilirsiniz; ancak ödüllerin verildiğini lütfen unutmayın </text:span><text:span text:style-name="Strong_20_Emphasis"><text:span text:style-name="T10">proje/sunum başına</text:span></text:span><text:span text:style-name="T14">, bireysel katılımcı başına değil.</text:span></text:p>
          </text:list-item>
        </text:list>
        <text:list text:style-name="L21">
          <text:list-item>
            <text:p text:style-name="P36"><text:span text:style-name="Strong_20_Emphasis"><text:span text:style-name="T10">Mentor ve Pazara Uygun Kontrol Noktası:</text:span></text:span><text:span text:style-name="T13"> </text:span><text:span text:style-name="T14">Ürününüzün gerçek dünyaya hazır olmasını sağlamak için, </text:span><text:span text:style-name="Strong_20_Emphasis"><text:span text:style-name="T10">kullanıcılara katılmaya başlamadan önce hem teknik sağlamlık hem de Market Fit hakkında mentor geri bildirimi almalısınız.</text:span></text:span><text:span text:style-name="T13"> </text:span><text:span text:style-name="T14">Bu stratejik incelemeye sahip olmayan kullanıcıların katılımı, Seviye 5 ve 6 için kemer ilerlemenize dahil edilmeyecektir.</text:span></text:p>
          </text:list-item>
        </text:list>
        <text:list text:style-name="L22">
          <text:list-item>
            <text:p text:style-name="P37"><text:span text:style-name="Strong_20_Emphasis"><text:span text:style-name="T10">Döndürme:</text:span></text:span><text:span text:style-name="T13"> </text:span><text:span text:style-name="T14">Temel felsefe ilerlemedir. Sizi bir projeyi "Level Up" yapmaya teşvik ediyoruz, ancak daha iyisi için dönmeniz gerekiyorsa </text:span><text:span text:style-name="Strong_20_Emphasis"><text:span text:style-name="T10">Market Uygun</text:span></text:span><text:span text:style-name="T14">, bir sonraki ay mentor onayı ile yeni bir projeye geçiş yapabilirsiniz.</text:span></text:p>
          </text:list-item>
        </text:list>
      </text:section>
      <text:p text:style-name="P14"><text:line-break/><text:line-break/><text:line-break/><text:line-break/><text:line-break/><text:line-break/><text:line-break/><text:line-break/><text:line-break/><text:line-break/><text:line-break/><text:line-break/><text:line-break/></text:p>
      <text:p text:style-name="P38"><text:soft-page-break/></text:p>
      <text:section text:style-name="Sect1" text:name="Section3">
        <text:p text:style-name="P39"><text:bookmark text:name="rich-text-wrapper Copy 2"/><text:span text:style-name="Strong_20_Emphasis"><text:span text:style-name="T6">👉 </text:span></text:span><text:span text:style-name="Strong_20_Emphasis"><text:span text:style-name="T8">Genel Bilgiler </text:span></text:span></text:p>
        <text:p text:style-name="P39"><text:span text:style-name="Strong_20_Emphasis"><text:span text:style-name="T8">Ustalığa Yıldız Yolculuğunun amacı nedir? </text:span></text:span></text:p>
        <text:p text:style-name="P40">Program, öğrenme ve nakliye arasındaki boşluğu doldurmayı amaçlamaktadır. Öğrenme sürecini gerçek dünyadaki bir ürün geliştirme yolculuğuna dönüştürmek istiyoruz. Geliştiriciler, yapılandırılmış bir yol izleyerek temel işlemlerden üretime hazır uygulamalar oluşturmaya geçerek Stellar'da yüksek kaliteli araçlar ve dApp'lerden oluşan sürdürülebilir bir ekosistemi teşvik ediyor. </text:p>
        <text:p text:style-name="P39"><text:span text:style-name="Strong_20_Emphasis"><text:span text:style-name="T8">Program online mı? </text:span></text:span></text:p>
        <text:p text:style-name="P40">Evet, program tamamen çevrimiçi. Dünyanın her yerinden katılabilir ve çalışmalarınızı gönderebilirsiniz. </text:p>
        <text:p text:style-name="P41"/>
        <text:p text:style-name="P15"><text:span text:style-name="Strong_20_Emphasis"><text:span text:style-name="T6">👉 </text:span></text:span><text:span text:style-name="Strong_20_Emphasis"><text:span text:style-name="T8">Program Mekaniği ve Katılım </text:span></text:span></text:p>
        <text:p text:style-name="P15"><text:span text:style-name="Strong_20_Emphasis"><text:span text:style-name="T8">Birden fazla projeyle veya her iki parçaya da katılabilir miyim? </text:span></text:span></text:p>
        <text:p text:style-name="P20">Hayır, bunu aynı ay içinde yapamazsınız. Maksimum odaklanma ve kaliteyi sağlamak için her katılımcının ayda bir parça ve bir proje seçmesi gerekir. Aynı döngü sırasında Başlangıç Pisti ve Oluşturucu Pisti'ne aynı anda katılamazsınız. </text:p>
        <text:p text:style-name="P20">Her parça farklı bir inşa etme biçimine odaklanır: </text:p>
        <text:list text:style-name="L23">
          <text:list-item>
            <text:p text:style-name="P42"><text:span text:style-name="Strong_20_Emphasis"><text:span text:style-name="T8">Oluşturucu Parçası: </text:span></text:span><text:span text:style-name="T6">Kendi projenizi adım adım inşa edip geliştiriyorsunuz. Gönderimler, projenizin her seviyedeki/kayıştaki ilerlemesine göre değerlendirilir. Aynı seviye için bir projenin aynı sürümünü tekrar gönderemezsiniz, yeniden değerlendirme için anlamlı değişiklikler veya yeni taahhütler gerekir. </text:span></text:p>
          </text:list-item>
        </text:list>
        <text:list text:style-name="L24">
          <text:list-item>
            <text:p text:style-name="P43"><text:span text:style-name="Strong_20_Emphasis"><text:span text:style-name="T8">Başlangıç Parçası: </text:span></text:span><text:span text:style-name="T6">Startup Track, Stellar üzerinde ölçeklenebilir ve etkili ürünler oluşturan yüksek potansiyelli kurucular ve ekipler için tasarlanmıştır. Esas olarak daha büyük hibe ve ekosistem desteği için tasarlanmıştır.</text:span></text:p>
          </text:list-item>
        </text:list>
        <text:p text:style-name="P15"><text:span text:style-name="Strong_20_Emphasis"><text:span text:style-name="T8">Her ay farklı bir projeyle katılabilir miyim? </text:span></text:span></text:p>
        <text:p text:style-name="P20">Bu programın temel felsefesi ilerlemedir. Her ay sıfırdan başlamak yerine projenize ve özelliklerine "Level Up" ile devam etmenizi öneririz. Bununla birlikte, ilk fikrinizin daha iyi bir Market Fit elde etmek için bir pivot ihtiyacı olduğunu fark ederseniz veya mentorlarımız bir yön değişikliği önerirse, bir sonraki ay mentor onayı ile farklı bir projeye geçiş yapabilirsiniz. </text:p>
        <text:p text:style-name="P15"><text:span text:style-name="Strong_20_Emphasis"><text:span text:style-name="T8">Daha önce başlattığım bir projeye katılabilir miyim?</text:span></text:span><text:span text:style-name="T6"> </text:span></text:p>
        <text:p text:style-name="P20">Amaç yeni bir şey inşa etmek veya önemli bir evrim göstermektir. Gönderimleriniz her kemer seviyesinin özel gereksinimlerini karşılamalı ve program döneminde kaydedilen yeni ilerlemeyi yansıtmalıdır. </text:p>
        <text:p text:style-name="P15"><text:span text:style-name="Strong_20_Emphasis"><text:span text:style-name="T8">Ne sıklıkla "Level Up" yapabilirim?</text:span></text:span><text:span text:style-name="T6"> </text:span></text:p>
        <text:p text:style-name="P20">İnşa edebileceğiniz kadar hızlı ilerleyebilirsiniz! Her ayın sonunda, tüm ilerlemeniz gözden geçirilir. Önceki her seviyenin kriterlerini başarıyla karşılamanız koşuluyla, elde ettiğiniz en yüksek kemer için ödüllendirileceksiniz. </text:p>
        <text:p text:style-name="P15"><text:span text:style-name="Strong_20_Emphasis"><text:span text:style-name="T8">Not: </text:span></text:span><text:span text:style-name="T6">Bir orta seviyenin (örneğin, Seviye 3) gereksinimlerini karşılayamazsanız, daha yüksek seviyeler için iş göndermiş olsanız bile, yalnızca zincirin kırılmadan kaldığı son seviye için (örneğin, Seviye 2) ödüllendirilirsiniz.</text:span></text:p>
        <text:p text:style-name="P15"><text:soft-page-break/><text:span text:style-name="Strong_20_Emphasis"><text:span text:style-name="T8">Aynı ay içinde birden fazla seviyeyi geçersem, her biri için ödül alır mıyım? </text:span></text:span></text:p>
        <text:p text:style-name="P20">Hayır. Ay sonunda, başarıyla ulaştığınız en yüksek seviyenin ödül havuzuna hak kazanırsınız. Örneğin, Beyaz'dan başlayıp bir ay içinde Turuncu Kuşak'a ulaşırsanız, yalnızca Turuncu Kuşak ödül dağıtımına katılırsınız. </text:p>
        <text:p text:style-name="P15"><text:span text:style-name="Strong_20_Emphasis"><text:span text:style-name="T8">Bir arkadaşımla bir proje üzerinde çalışıyorum. Ayrı ayrı mı başvuralım? </text:span></text:span></text:p>
        <text:p text:style-name="P20">Ekip olarak çalışabilirsiniz, ancak belirli bir seviye için ödülün kişi başına değil, proje / başvuru başına verildiğini lütfen unutmayın. </text:p>
        <text:p text:style-name="P15"><text:span text:style-name="Strong_20_Emphasis"><text:span text:style-name="T8">Usta Kemer'e ulaştığımda ne olacak? Son mu yani? </text:span></text:span></text:p>
        <text:p text:style-name="P20">Hiç de değil! Master Belt, devam eden bir başarı olacak şekilde tasarlanmıştır. Seviye 7'ye ulaştığınızda, uygulamanıza önemli yeni özellikler göndererek ve Stellar ekosistemine daha fazla gerçek kullanıcı ekleyerek aylık ödül havuzuna katılmaya devam edebilirsiniz. Projenizin etkisini ölçeklendirmek. Her zaman iyileştirmeye yer vardır ve projelerini her ay büyütmeye devam eden üst düzey inşaatçıları ödüllendirmeye devam edeceğiz. </text:p>
        <text:p text:style-name="P15"><text:span text:style-name="Strong_20_Emphasis"><text:span text:style-name="T8">Ödül için birden fazla ay boyunca aynı seviyede yarışabilir miyim? </text:span></text:span></text:p>
        <text:p text:style-name="P20">Hayır. Bir seviyeyi başarıyla tamamlayıp ödülü aldıktan sonra, gelecekteki ödül havuzlarına hak kazanmak için bir sonraki kemer seviyesine geçmelisiniz. Ancak, Master Belt'e (Seviye 7) ulaştığınızda, ürününüzü ölçeklendirmek ve ödül döngüsünde aktif kalmak için aylık geliştirmeler yapmaya devam edebilirsiniz. </text:p>
        <text:p text:style-name="P41"/>
        <text:p text:style-name="P15"><text:span text:style-name="Strong_20_Emphasis"><text:span text:style-name="T6">👉 </text:span></text:span><text:span text:style-name="Strong_20_Emphasis"><text:span text:style-name="T8">Ödüller ve Değerlendirme </text:span></text:span></text:p>
        <text:p text:style-name="P15"><text:span text:style-name="Strong_20_Emphasis"><text:span text:style-name="T8">Ödül alanlar nasıl seçiliyor? </text:span></text:span></text:p>
        <text:p text:style-name="P20">Başvurular bütünsel bir puanlama sistemi kullanılarak teknik bir komite tarafından değerlendirilir. Şunları ararız: </text:p>
        <text:p text:style-name="P15"><text:span text:style-name="Strong_20_Emphasis"><text:span text:style-name="T8">Temel Teknik Standartlar: </text:span></text:span><text:span text:style-name="T6">Güçlü işlevsellik, seviye gereksinimlerine sıkı sıkıya bağlılık ve kapsamlı belgeler. </text:span></text:p>
        <text:p text:style-name="P15"><text:span text:style-name="Strong_20_Emphasis"><text:span text:style-name="T8">Kod Kalitesi ve Güvenliği:</text:span></text:span><text:span text:style-name="T6"> Temiz, iyi yapılandırılmış ve verimli kod. Daha yüksek seviyeler için akıllı sözleşme güvenliği ve optimizasyon da temel değerlendirme kriterleridir. </text:span></text:p>
        <text:p text:style-name="P15"><text:span text:style-name="Strong_20_Emphasis"><text:span text:style-name="T8">Ekosistem Uygun:</text:span></text:span><text:span text:style-name="T6"> Projeniz gerçek bir sorunu mu çözüyor yoksa Stellar ekosistemindeki bir boşluğu mu dolduruyor? Faydası yüksek projelere öncelik veriyoruz. </text:span></text:p>
        <text:p text:style-name="P15"><text:span text:style-name="Strong_20_Emphasis"><text:span text:style-name="T8">Kullanıcı Çekişi (Seviye 5, 6 ve 7): </text:span></text:span><text:span text:style-name="T6">Mavi ve Siyah Kuşaklar için teknik tamamlama savaşın yalnızca yarısıdır. Uygulamanızla aktif kullanıcı katılımını ve gerçek dünya etkileşimini göstermelisiniz. </text:span></text:p>
        <text:p text:style-name="P15"><text:span text:style-name="Strong_20_Emphasis"><text:span text:style-name="T8">20.000$'lık ödül havuzu nasıl tahsis ediliyor? </text:span></text:span></text:p>
        <text:p text:style-name="P15"><text:span text:style-name="Strong_20_Emphasis"><text:span text:style-name="T8">Oluşturucu Parçası: </text:span></text:span><text:span text:style-name="T6">Bu performansa dayalı bir havuz. Her seviyenin bir ödülü olsa da, karmaşık kilometre taşlarına ulaşanları, gemi üretimine hazır kodları ve başarılı bir şekilde yerleşik kullanıcıları ödüllendirmek için havuzun çoğunluğu daha yüksek kuşaklara (Mavi, Siyah ve Ana kuşak) doğru ağırlıklandırılır. </text:span></text:p>
        <text:p text:style-name="P15"><text:span text:style-name="Strong_20_Emphasis"><text:span text:style-name="T8">Ödüllerimizi ne zaman alacağız?</text:span></text:span><text:span text:style-name="T6"> </text:span></text:p>
        <text:p text:style-name="P20"><text:soft-page-break/>Ödül dağıtımları aylık olarak işlenmektedir. Değerlendirme süresinden sonra kazananlar bilgilendirilecek ve ödüller cüzdanlarına gönderilecektir. </text:p>
        <text:p text:style-name="P41"/>
        <text:p text:style-name="P15"><text:span text:style-name="Strong_20_Emphasis"><text:span text:style-name="T6">👉 </text:span></text:span><text:span text:style-name="Strong_20_Emphasis"><text:span text:style-name="T8">Öğrenme ve Destek </text:span></text:span></text:p>
        <text:p text:style-name="P15"><text:span text:style-name="Strong_20_Emphasis"><text:span text:style-name="T8">Canlı oturumlar veya soru-cevap etkinlikleri olacak mı? </text:span></text:span></text:p>
        <text:p text:style-name="P20">Evet! Yolculuğunuzu desteklemek için düzenli ofis saatleri, teknik atölyeler ve canlı Soru-Cevap oturumları düzenleyeceğiz (katılım isteğe bağlıdır). Program için topluluk kanallarımızı kontrol edin. </text:p>
        <text:p text:style-name="P41"/>
        <text:p text:style-name="P15"><text:span text:style-name="Strong_20_Emphasis"><text:span text:style-name="T6">💰 </text:span></text:span><text:span text:style-name="Strong_20_Emphasis"><text:span text:style-name="T15">Ekosistem Finansman Fırsatları</text:span></text:span></text:p>
        <text:p text:style-name="P44">Seçilen Startup Track ekipleri, aşağıdakiler dahil olmak üzere ekosistem finansman fırsatlarına uygun hale gelebilir:</text:p>
        <text:h text:style-name="P45" text:outline-level="2">🏆 <text:span text:style-name="T16">InstaAward — 15.000 $'a kadar</text:span></text:h>
        <text:p text:style-name="P44">Güçlü uygulama ve ekosistem değerine sahip gelecek vaat eden Stellar projeleri için hızlı finansman desteği.</text:p>
        <text:h text:style-name="P45" text:outline-level="2">🌍 <text:span text:style-name="T16">Yıldız Topluluk Fonu (SCF) — 150.000 $'a kadar</text:span></text:h>
        <text:p text:style-name="P44">Çekiş gücü, ölçeklenebilirlik, teknik kalite ve ekosistem etkisine dayalı olarak Stellar Topluluk Fonu hibeleri için yüksek potansiyelli projeler önerilebilir.</text:p>
      </text:section>
      <text:p text:style-name="P1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span text:style-name="T7">Büyük Resim: Ödüller ve Büyüme Yolu</text:span></text:p>
      <text:section text:style-name="Sect1" text:name="Section4">
        <text:p text:style-name="P15"><text:bookmark text:name="rich-text-wrapper Copy 3"/><text:span text:style-name="T14">The </text:span><text:span text:style-name="Strong_20_Emphasis"><text:span text:style-name="T10">Ustalığa Yıldız Yolculuğu</text:span></text:span><text:span text:style-name="T13"> </text:span><text:span text:style-name="T14">bu sadece bir zorluktan daha fazlasıdır; Stellar'da kendi ürününüzü oluşturduğunuz için ödüllendirildiğiniz profesyonel bir geliştiricinin yolculuğudur. Bir tane tasarladık </text:span><text:span text:style-name="Strong_20_Emphasis"><text:span text:style-name="T10">Aylık 20.000$ ödül havuzu</text:span></text:span><text:span text:style-name="T13"> </text:span><text:span text:style-name="T14">ekosistemimizdeki en adanmış ve yetenekli inşaatçıları güçlendirmek ve ödüllendirmek.</text:span></text:p>
        <text:p text:style-name="P15"><text:span text:style-name="T14">Program, Stellar ağında ustalaştıkça büyümenizi ödüllendirmek için tasarlanmıştır. Her ayın sonunda ödül havuzu için yarışmaya hak kazanırsınız </text:span><text:span text:style-name="Strong_20_Emphasis"><text:span text:style-name="T10">en yüksek geçerli kemer</text:span></text:span><text:span text:style-name="T13"> </text:span><text:span text:style-name="T14">başarmışsınız. Rütbelerde ilerledikçe, kazanma fırsatınız olur </text:span><text:span text:style-name="Strong_20_Emphasis"><text:span text:style-name="T10">ayda 250,00$'a kadar</text:span></text:span><text:span text:style-name="T13"> </text:span><text:span text:style-name="T14">rekabetçi hibelerde.</text:span></text:p>
        <text:p text:style-name="P15"><text:span text:style-name="Strong_20_Emphasis"><text:span text:style-name="T10">Profesyonel İpucu:</text:span></text:span><text:span text:style-name="T13"> </text:span><text:span text:style-name="T14">Bir kere vurdun mu </text:span><text:span text:style-name="Strong_20_Emphasis"><text:span text:style-name="T10">Usta Kemer</text:span></text:span><text:span text:style-name="T14">, yolculuk bitmiyor! Projenizi ölçeklendirerek, daha fazla kullanıcıya katılarak ve akıllı sözleşmelerinize temel özellikler ekleyerek aylık ödüller kazanmaya devam edebilirsiniz. Bu sizi göreve hazır tutar </text:span><text:span text:style-name="Strong_20_Emphasis"><text:span text:style-name="T10">Yıldız Topluluğu Fonu (SCF)</text:span></text:span><text:span text:style-name="T13"> </text:span><text:span text:style-name="T14">ve büyük yatırım fırsatları.</text:span></text:p>
        <text:p text:style-name="P41"/>
        <text:p text:style-name="P15"><text:span text:style-name="T13">🏁</text:span><text:span text:style-name="Strong_20_Emphasis"><text:span text:style-name="T13"> </text:span></text:span><text:span text:style-name="Strong_20_Emphasis"><text:span text:style-name="T10">Programın Ötesinde: Kemerlerden İşletmeye (Başlangıç Yolu)</text:span></text:span></text:p>
        <text:p text:style-name="P20"><text:span text:style-name="T12">Bu yolculuk, fikriniz ile başarılı bir ürün arasındaki engelleri kaldırmak için tasarlanmıştır. Amacımız küresel ölçekte başarılı olduğunuzu görmek.</text:span></text:p>
        <text:p text:style-name="P15"><text:span text:style-name="Strong_20_Emphasis"><text:span text:style-name="T10">Bir Başarı Hikayesi:</text:span></text:span><text:span text:style-name="T13"> </text:span><text:span text:style-name="T14">Son zamanlarda, </text:span><text:span text:style-name="Strong_20_Emphasis"><text:span text:style-name="T10">Arda</text:span></text:span><text:span text:style-name="T14">topluluğumuzun bir üyesi olarak tam da bu yolda ilerledi </text:span><text:span text:style-name="Strong_20_Emphasis"><text:span text:style-name="T10">XBANK projesi</text:span></text:span><text:span text:style-name="T14">. Ürününü ekosistemimiz aracılığıyla geliştirdi ve başarıyla güvence altına aldı </text:span><text:span text:style-name="Strong_20_Emphasis"><text:span text:style-name="T10">90.000$ hibe</text:span></text:span><text:span text:style-name="T13"> </text:span><text:span text:style-name="T14">stellar Community Fund'dan (SCF). Bir sonraki başarı hikayesi olmanızı istiyoruz.</text:span></text:p>
        <text:p text:style-name="P46">Mezunlar ve Kara Kuşak sahipleri aşağıdakiler için hızlı takip edilir:</text:p>
        <text:list text:style-name="L25">
          <text:list-item>
            <text:p text:style-name="P47"><text:span text:style-name="Strong_20_Emphasis"><text:span text:style-name="T10">SCF Hibe Başvuruları:</text:span></text:span><text:span text:style-name="T13"> </text:span><text:span text:style-name="T14">Üst düzey fonlama (100K $ + 'a kadar) güvence altına almak için rehberlik.</text:span></text:p>
          </text:list-item>
        </text:list>
        <text:list text:style-name="L26">
          <text:list-item>
            <text:p text:style-name="P48"><text:span text:style-name="Strong_20_Emphasis"><text:span text:style-name="T10">Ekosistem Tanıtımları:</text:span></text:span><text:span text:style-name="T13"> </text:span><text:span text:style-name="T14">Ortaklara, VC'lere ve SDG'ye doğrudan bağlantılar.</text:span></text:p>
          </text:list-item>
        </text:list>
        <text:list text:style-name="L27">
          <text:list-item>
            <text:p text:style-name="P49"><text:span text:style-name="Strong_20_Emphasis"><text:span text:style-name="T10">Uzmanlaşmış Mentorluk:</text:span></text:span><text:span text:style-name="T13"> </text:span><text:span text:style-name="T14">Ölçeklendirme ve tam üretim için birebir destek.</text:span></text:p>
          </text:list-item>
        </text:list>
      </text:section>
      <text:p text:style-name="P14"><text:line-break/><text:line-break/><text:line-break/><text:line-break/><text:line-break/><text:line-break/><text:line-break/><text:line-break/><text:line-break/><text:line-break/><text:line-break/><text:line-break/><text:line-break/><text:line-break/><text:line-break/><text:soft-page-break/><text:line-break/><text:span text:style-name="T7">Değerlendirme Kriterleri</text:span></text:p>
      <text:section text:style-name="Sect1" text:name="Section5">
        <text:p text:style-name="P15"><text:bookmark text:name="rich-text-wrapper Copy 4"/><text:span text:style-name="T17">Adil ve kaliteli bir deneyim sağlamak için teknik komitemiz kazananları aşağıdakilere göre seçer </text:span><text:span text:style-name="Strong_20_Emphasis"><text:span text:style-name="T18">karşılaştırmalı inceleme</text:span></text:span><text:span text:style-name="T17">. Başvurular bütünsel bir puanlama sistemi kullanılarak teknik bir komite tarafından değerlendirilir. Şunları ararız:</text:span></text:p>
        <text:list text:style-name="L28">
          <text:list-item>
            <text:p text:style-name="P50"><text:span text:style-name="Strong_20_Emphasis"><text:span text:style-name="T18">Temel Teknik Standartlar:</text:span></text:span><text:span text:style-name="T6"> </text:span><text:span text:style-name="T17">Güçlü işlevsellik, seviye gereksinimlerine sıkı sıkıya bağlılık ve kapsamlı belgeler.</text:span></text:p>
          </text:list-item>
        </text:list>
        <text:list text:style-name="L29">
          <text:list-item>
            <text:p text:style-name="P51"><text:span text:style-name="Strong_20_Emphasis"><text:span text:style-name="T18">Kod Kalitesi ve Güvenliği:</text:span></text:span><text:span text:style-name="T6"> </text:span><text:span text:style-name="T17">Temiz, iyi yapılandırılmış ve verimli kod. Daha yüksek seviyeler için akıllı sözleşme güvenliği ve optimizasyon da temel değerlendirme kriterleridir.</text:span></text:p>
          </text:list-item>
        </text:list>
        <text:list text:style-name="L30">
          <text:list-item>
            <text:p text:style-name="P52"><text:span text:style-name="Strong_20_Emphasis"><text:span text:style-name="T18">Ekosistem Uygun:</text:span></text:span><text:span text:style-name="T6"> </text:span><text:span text:style-name="T17">Projeniz gerçek bir sorunu mu çözüyor yoksa Stellar ekosistemindeki bir boşluğu mu dolduruyor? Faydası yüksek projelere öncelik veriyoruz.</text:span></text:p>
          </text:list-item>
        </text:list>
        <text:list text:style-name="L31">
          <text:list-item>
            <text:p text:style-name="P53"><text:span text:style-name="Strong_20_Emphasis"><text:span text:style-name="T18">Kullanıcı Çekişi (Seviye 5 ve 6 ve 7):</text:span></text:span><text:span text:style-name="T6"> </text:span><text:span text:style-name="T17">Mavi, Siyah Kemerler ve Ana Kemer için teknik tamamlama savaşın yalnızca yarısıdır. Uygulamanızla aktif kullanıcı katılımını ve gerçek dünya etkileşimini göstermelisiniz.</text:span></text:p>
          </text:list-item>
        </text:list>
      </text:section>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5T14:45:38.155573400</meta:creation-date>
    <dc:date>2026-06-25T14:52:18.475929100</dc:date>
    <meta:editing-duration>PT6M42S</meta:editing-duration>
    <meta:editing-cycles>1</meta:editing-cycles>
    <meta:document-statistic meta:table-count="1" meta:image-count="0" meta:object-count="0" meta:page-count="8" meta:paragraph-count="135" meta:word-count="1815" meta:character-count="13801" meta:non-whitespace-character-count="12018"/>
    <meta:generator>LibreOffice/25.8.7.3$Windows_X86_64 LibreOffice_project/30742500f2d3eb4366ac312fa33d3dcabdb3eba5</meta:generator>
  </office:meta>
</office:document-meta>
</file>